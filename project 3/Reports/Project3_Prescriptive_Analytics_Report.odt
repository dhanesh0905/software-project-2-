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16000003CC4DAEECE952C42AFE.png" manifest:media-type="image/png"/>
  <manifest:file-entry manifest:full-path="Pictures/1000020100000573000002142A3C8E82FB8A7CF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table:align="left" style:writing-mode="lr-tb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3.1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f4e5f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.A3" style:family="table-cell">
      <style:table-cell-properties style:vertical-align="middle" fo:background-color="#eaf2f4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25in" fo:margin-left="0in" fo:margin-top="0in" fo:margin-bottom="0in" table:align="left" style:writing-mode="lr-tb"/>
    </style:style>
    <style:style style:name="Table2.A" style:family="table-column">
      <style:table-column-properties style:column-width="3.125in"/>
    </style:style>
    <style:style style:name="Table2.B" style:family="table-column">
      <style:table-column-properties style:column-width="3.124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1f4e5f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2.A3" style:family="table-cell">
      <style:table-cell-properties style:vertical-align="middle" fo:background-color="#eaf2f4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master-page-name="Standard">
      <style:paragraph-properties fo:margin-top="1.25in" fo:margin-bottom="0in" loext:contextual-spacing="false" style:page-number="auto"/>
    </style:style>
    <style:style style:name="P4" style:family="paragraph" style:parent-style-name="Standard">
      <style:paragraph-properties fo:margin-top="0in" fo:margin-bottom="0.0835in" loext:contextual-spacing="false" fo:text-align="center" style:justify-single-word="false"/>
    </style:style>
    <style:style style:name="P5" style:family="paragraph" style:parent-style-name="Standard">
      <style:paragraph-properties fo:margin-top="0in" fo:margin-bottom="0.278in" loext:contextual-spacing="false" fo:text-align="center" style:justify-single-word="false"/>
    </style:style>
    <style:style style:name="P6" style:family="paragraph" style:parent-style-name="Standard">
      <style:paragraph-properties fo:margin-top="0in" fo:margin-bottom="0.2083in" loext:contextual-spacing="false" fo:text-align="center" style:justify-single-word="false"/>
    </style:style>
    <style:style style:name="P7" style:family="paragraph" style:parent-style-name="Standard">
      <style:paragraph-properties fo:margin-top="0in" fo:margin-bottom="0.8335in" loext:contextual-spacing="false" fo:text-align="center" style:justify-single-word="false"/>
    </style:style>
    <style:style style:name="P8" style:family="paragraph" style:parent-style-name="Standard">
      <style:paragraph-properties fo:margin-top="0in" fo:margin-bottom="0.0555in" loext:contextual-spacing="false" fo:text-align="center" style:justify-single-word="false"/>
    </style:style>
    <style:style style:name="P9" style:family="paragraph" style:parent-style-name="Standard">
      <style:paragraph-properties fo:margin-top="0in" fo:margin-bottom="0.111in" loext:contextual-spacing="false" fo:text-align="start" style:justify-single-word="false"/>
    </style:style>
    <style:style style:name="P10" style:family="paragraph" style:parent-style-name="Standard">
      <style:paragraph-properties fo:margin-top="0.0835in" fo:margin-bottom="0.0417in" loext:contextual-spacing="false" fo:text-align="center" style:justify-single-word="false"/>
    </style:style>
    <style:style style:name="P11" style:family="paragraph" style:parent-style-name="Standard">
      <style:paragraph-properties fo:margin-top="0in" fo:margin-bottom="0.1528in" loext:contextual-spacing="false" fo:text-align="center" style:justify-single-word="false"/>
    </style:style>
    <style:style style:name="P12" style:family="paragraph" style:parent-style-name="Heading_20_2">
      <style:paragraph-properties fo:margin-top="0.1807in" fo:margin-bottom="0.0835in" loext:contextual-spacing="false"/>
    </style:style>
    <style:style style:name="P13" style:family="paragraph" style:parent-style-name="Heading_20_1">
      <style:paragraph-properties fo:margin-top="0.25in" fo:margin-bottom="0.111in" loext:contextual-spacing="false" fo:break-before="page"/>
    </style:style>
    <style:style style:name="P14" style:family="paragraph" style:parent-style-name="Heading_20_1">
      <style:paragraph-properties fo:margin-top="0.25in" fo:margin-bottom="0.111in" loext:contextual-spacing="false"/>
    </style:style>
    <style:style style:name="P15" style:family="paragraph" style:parent-style-name="List_20_Paragraph" style:list-style-name="WWNum1">
      <style:paragraph-properties fo:margin-top="0in" fo:margin-bottom="0.0555in" loext:contextual-spacing="false"/>
    </style:style>
    <style:style style:name="T1" style:family="text">
      <style:text-properties fo:color="#595959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595959"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595959" fo:font-size="9pt" fo:font-style="italic" style:font-size-asian="9pt" style:font-style-asian="italic" style:font-size-complex="9pt" style:font-style-complex="italic"/>
    </style:style>
    <style:style style:name="T4" style:family="text">
      <style:text-properties fo:color="#595959" fo:font-size="8pt" style:font-size-asian="8pt" style:font-size-complex="8pt"/>
    </style:style>
    <style:style style:name="T5" style:family="text">
      <style:text-properties fo:color="#1f4e5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e79aa" style:font-size-asian="11pt" style:font-size-complex="11pt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span text:style-name="T1">SOFTWARE PROJECT 2</text:span></text:p>
      <text:p text:style-name="P5"><text:span text:style-name="T5">Project 3 — Prescriptive Analytics</text:span></text:p>
      <text:p text:style-name="P6"><text:span text:style-name="T6">Allocating a Road-Safety Budget Across US States</text:span></text:p>
      <text:p text:style-name="P7"><text:span text:style-name="T2">Dataset: car_crashes.csv (51 records)</text:span></text:p>
      <text:p text:style-name="P8"><text:span text:style-name="T7">Prepared by: </text:span><text:span text:style-name="T8">Dhanesh kumar</text:span></text:p>
      <text:p text:style-name="P8"><text:span text:style-name="T7">Course: </text:span><text:span text:style-name="T8">software project 2 </text:span></text:p>
      <text:p text:style-name="P8"><text:span text:style-name="T7">Date: July 1</text:span><text:span text:style-name="T8">3</text:span><text:span text:style-name="T7">, 2026</text:span></text:p>
      <text:p text:style-name="Standard"/>
      <text:p text:style-name="P13">1. Introduction &amp; Business Objective</text:p>
      <text:p text:style-name="P9">Prescriptive analytics goes one step further than predictive analytics: instead of only forecasting an outcome, it recommends the best action to take given limited resources and real constraints. This project poses a resource-allocation problem: a national road-safety agency has state-level crash data and a fixed budget for a targeted safety campaign addressing speeding and drunk driving. The question is not “which states have the most crashes?” (descriptive) or “how many crashes will a state have?” (predictive) — it is: given that not every state can be funded, exactly which states should receive funding, and how much, to maximize the total reduction in crashes?</text:p>
      <text:p text:style-name="P14">2. Dataset Description</text:p>
      <text:p text:style-name="P9">The analysis uses the "car_crashes" dataset — one row per US state plus DC (51 records), a third dataset distinct from Projects 1 and 2 — recording the crash rate per billion miles driven, the share of fatal-crash drivers who were speeding or alcohol-impaired, and each state's average insurance premium and losses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<text:span text:style-name="T9">Column</text:span></text:p>
            </table:table-cell>
            <table:table-cell table:style-name="Table1.A1" office:value-type="string">
              <text:p text:style-name="P1"><text:span text:style-name="T9">Description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<text:span text:style-name="T10">total</text:span></text:p>
          </table:table-cell>
          <table:table-cell table:style-name="Table1.A2" office:value-type="string">
            <text:p text:style-name="P1"><text:span text:style-name="T10">Crashes per billion miles driven</text:span></text:p>
          </table:table-cell>
        </table:table-row>
        <table:table-row table:style-name="Table1.1">
          <table:table-cell table:style-name="Table1.A3" office:value-type="string">
            <text:p text:style-name="P1"><text:span text:style-name="T10">speeding, alcohol</text:span></text:p>
          </table:table-cell>
          <table:table-cell table:style-name="Table1.A3" office:value-type="string">
            <text:p text:style-name="P1"><text:span text:style-name="T10">% of fatal-crash drivers who were speeding / alcohol-impaired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0">not_distracted</text:span></text:p>
          </table:table-cell>
          <table:table-cell table:style-name="Table1.A2" office:value-type="string">
            <text:p text:style-name="P1"><text:span text:style-name="T10">% of fatal-crash drivers who were NOT distracted</text:span></text:p>
          </table:table-cell>
        </table:table-row>
        <table:table-row table:style-name="Table1.1">
          <table:table-cell table:style-name="Table1.A3" office:value-type="string">
            <text:p text:style-name="P1"><text:span text:style-name="T10">no_previous</text:span></text:p>
          </table:table-cell>
          <table:table-cell table:style-name="Table1.A3" office:value-type="string">
            <text:p text:style-name="P1"><text:span text:style-name="T10">% of fatal-crash drivers with NO prior accidents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0">ins_premium, ins_losses</text:span></text:p>
          </table:table-cell>
          <table:table-cell table:style-name="Table1.A2" office:value-type="string">
            <text:p text:style-name="P1"><text:span text:style-name="T10">Average insurance premium and losses for the state</text:span></text:p>
          </table:table-cell>
        </table:table-row>
      </table:table>
      <text:p text:style-name="P14">3. Methodology</text:p>
      <text:p text:style-name="P12">3.1 Importing Libraries and Loading the Data</text:p>
      <text:p text:style-name="P9">Alongside the standard pandas/numpy/matplotlib/seaborn stack, scikit-learn provides the Linear Regression model and cross-validation tools, and SciPy's linprog function solves the linear program at the core of the prescriptive recommendation.</text:p>
      <text:p text:style-name="P12">3.2 Data Cleaning and Preprocessing</text:p>
      <text:p text:style-name="P9">As a small, well-maintained reference dataset, car_crashes has no missing values and no negative percentages, but the standard checks are run rather than assumed.</text:p>
      <text:p text:style-name="P12">3.3 Duplicate Removal</text:p>
      <text:p text:style-name="P9">No duplicate rows are found in this 51-row dataset.</text:p>
      <text:p text:style-name="P12">3.4 Feature Selection</text:p>
      <text:p text:style-name="P9">The state abbreviation is an identifier, not a predictive feature — useful for labeling results but meaningless as numeric model input — so it is excluded from the regression's feature set while being kept in the DataFrame for readability.</text:p>
      <text:p text:style-name="P12"><text:soft-page-break/>3.5 Encoding Categorical Attributes</text:p>
      <text:p text:style-name="P9">The dataset has no natural categorical column beyond the state code, so one is engineered: each state is mapped to its official US Census Bureau region (Northeast / Midwest / South / West) and one-hot encoded, enabling a regional breakdown in the exploratory analysis.</text:p>
      <text:p text:style-name="P14">4. Exploratory Data Analysis</text:p>
      <text:p text:style-name="P9">Alcohol and speeding involvement both correlate positively with total crash rate, matching intuition — these are the two behavioral factors a public-awareness campaign can realistically influence. The South shows the highest average crash rate by region, while the Northeast shows the lowest.</text:p>
      <text:p text:style-name="P10"><draw:frame draw:style-name="fr1" draw:name="Image1" text:anchor-type="as-char" svg:width="5.4165in" svg:height="4.0417in" draw:z-index="0"><draw:image xlink:href="Pictures/1000020100000516000003CC4DAEECE952C42AFE.png" xlink:type="simple" xlink:show="embed" xlink:actuate="onLoad" loext:mime-type="image/png"/></draw:frame></text:p>
      <text:p text:style-name="P11"><text:span text:style-name="T3">Figure 1. Alcohol/speeding vs. crash rate, the ten highest-risk states, and crash rate by region.</text:span></text:p>
      <text:p text:style-name="P14">5. Model Building &amp; Evaluation</text:p>
      <text:p text:style-name="P12">5.1 Predictive layer — what drives crash rate?</text:p>
      <text:p text:style-name="P9">With only 51 rows, a single train/test split would leave a test set too small to trust, so the model is evaluated with 5-fold cross-validation instead — a more reliable approach for small datasets. A linear regression using all four behavioral features achieves a mean cross-validated R² of 0.91, which is strong for cross-sectional, state-level social data of this kind.</text:p>
      <text:p text:style-name="P9">A methodological note on collinearity: in the full 4-variable model, the coefficient on speeding comes out slightly negative even though speeding correlates positively with crash rate on its own — a classic multicollinearity symptom, since speeding overlaps enough with no_previous and alcohol that the full model's coefficients describe partial effects holding the other variables constant. Since the campaign can only target speeding and alcohol anyway, a separate, dedicated two-variable model (R² = 0.73) is fit using <text:soft-page-break/>just those two predictors for the prescriptive step below — both coefficients come out positive, as expected, avoiding an artifact from variables the campaign does not target.</text:p>
      <text:p text:style-name="P12">5.2 Prescriptive layer — optimal budget allocation</text:p>
      <text:p text:style-name="P9">Each state's “actionable risk score” is defined as the dedicated model's fitted contribution of speeding and alcohol involvement. Campaign cost is assumed to scale with each state's insurance-premium level (a stated simplifying assumption, used as a proxy for market/media cost). With a total budget covering only 30% of the cost to fund every state, linear programming (SciPy's linprog) determines what fraction of full funding each state should receive to maximize total expected benefit.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"><text:span text:style-name="T9">Metric</text:span></text:p>
            </table:table-cell>
            <table:table-cell table:style-name="Table2.A1" office:value-type="string">
              <text:p text:style-name="P1"><text:span text:style-name="T9">Value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"><text:span text:style-name="T10">Total cost to fund every state</text:span></text:p>
          </table:table-cell>
          <table:table-cell table:style-name="Table2.A2" office:value-type="string">
            <text:p text:style-name="P1"><text:span text:style-name="T10">$45,235</text:span></text:p>
          </table:table-cell>
        </table:table-row>
        <table:table-row table:style-name="Table2.1">
          <table:table-cell table:style-name="Table2.A3" office:value-type="string">
            <text:p text:style-name="P1"><text:span text:style-name="T10">Available budget (30%)</text:span></text:p>
          </table:table-cell>
          <table:table-cell table:style-name="Table2.A3" office:value-type="string">
            <text:p text:style-name="P1"><text:span text:style-name="T10">$13,570</text:span></text:p>
          </table:table-cell>
        </table:table-row>
        <table:table-row table:style-name="Table2.1">
          <table:table-cell table:style-name="Table2.A2" office:value-type="string">
            <text:p text:style-name="P1"><text:span text:style-name="T10">Optimal total expected benefit</text:span></text:p>
          </table:table-cell>
          <table:table-cell table:style-name="Table2.A2" office:value-type="string">
            <text:p text:style-name="P1"><text:span text:style-name="T10">229.25</text:span></text:p>
          </table:table-cell>
        </table:table-row>
        <table:table-row table:style-name="Table2.1">
          <table:table-cell table:style-name="Table2.A3" office:value-type="string">
            <text:p text:style-name="P1"><text:span text:style-name="T10">States fully funded</text:span></text:p>
          </table:table-cell>
          <table:table-cell table:style-name="Table2.A3" office:value-type="string">
            <text:p text:style-name="P1"><text:span text:style-name="T10">17</text:span></text:p>
          </table:table-cell>
        </table:table-row>
        <table:table-row table:style-name="Table2.1">
          <table:table-cell table:style-name="Table2.A2" office:value-type="string">
            <text:p text:style-name="P1"><text:span text:style-name="T10">States partially funded</text:span></text:p>
          </table:table-cell>
          <table:table-cell table:style-name="Table2.A2" office:value-type="string">
            <text:p text:style-name="P1"><text:span text:style-name="T10">1 (Ohio)</text:span></text:p>
          </table:table-cell>
        </table:table-row>
        <table:table-row table:style-name="Table2.1">
          <table:table-cell table:style-name="Table2.A3" office:value-type="string">
            <text:p text:style-name="P1"><text:span text:style-name="T10">Greedy benefit-per-dollar heuristic matches LP optimum</text:span></text:p>
          </table:table-cell>
          <table:table-cell table:style-name="Table2.A3" office:value-type="string">
            <text:p text:style-name="P1"><text:span text:style-name="T10">Yes</text:span></text:p>
          </table:table-cell>
        </table:table-row>
      </table:table>
      <text:p text:style-name="P10"><draw:frame draw:style-name="fr1" draw:name="Image2" text:anchor-type="as-char" svg:width="5.6252in" svg:height="2.1457in" draw:z-index="1"><draw:image xlink:href="Pictures/1000020100000573000002142A3C8E82FB8A7CFE.png" xlink:type="simple" xlink:show="embed" xlink:actuate="onLoad" loext:mime-type="image/png"/></draw:frame></text:p>
      <text:p text:style-name="P11"><text:span text:style-name="T3">Figure 2. Prescribed funding fraction by state, and the cost-vs-benefit trade-off colored by funding decision.</text:span></text:p>
      <text:p text:style-name="P14">6. Results Interpretation &amp; Discussion</text:p>
      <text:list xml:id="list2633636858" text:style-name="WWNum1">
        <text:list-item>
          <text:p text:style-name="P15">The optimizer does not simply fund the states with the highest raw crash rate — it funds the states with the best expected benefit per dollar, and a simple greedy benefit-per-dollar ranking independently confirms the same allocation, validating that the LP found the true optimum for this budget structure.</text:p>
        </text:list-item>
        <text:list-item>
          <text:p text:style-name="P15">Some high-crash-rate states with a high campaign cost receive partial or no funding this round, while some states with more moderate crash rates but a favorable cost profile are funded in full — a counter-intuitive, resource-aware recommendation that distinguishes prescriptive analytics from simply ranking states by risk.</text:p>
        </text:list-item>
        <text:list-item>
          <text:p text:style-name="P15">If more budget becomes available, the same model can be re-solved instantly with an updated budget figure to see exactly which state is funded next: the marginal state at the funding cutoff is the one with the best benefit-per-dollar among those not yet funded.</text:p>
        </text:list-item>
      </text:list>
      <text:p text:style-name="P9">Limitations stated honestly: the cost proxy (insurance premium) and the assumption that campaign benefit is linear in speeding/alcohol involvement are simplifications made explicit for this exercise; a production version would use actual program-cost estimates and, ideally, a causal (not just correlational) estimate of campaign effectiveness.</text:p>
      <text:p text:style-name="P14"><text:soft-page-break/>7. Conclusion</text:p>
      <text:p text:style-name="P9">This project demonstrates a complete prescriptive-analytics workflow: a predictive regression model quantifies how much each behavioral factor drives crash rate, and a linear program then uses those estimates to recommend an optimal, budget-constrained allocation across 51 states — directly answering the resource-allocation question that descriptive or predictive analytics alone could n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default-outline-level="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" style:class="text">
      <style:paragraph-properties fo:margin-top="0.2083in" fo:margin-bottom="0.1043in" loext:contextual-spacing="false"/>
      <style:text-properties fo:color="#1f4e5f" style:font-name="Calibri1" fo:font-family="Calibri" style:font-family-generic="swiss" style:font-pitch="variable" fo:font-size="15pt" fo:font-weight="bold" style:font-name-asian="Calibri2" style:font-family-asian="Calibri" style:font-family-generic-asian="system" style:font-pitch-asian="variable" style:font-size-asian="15pt" style:font-weight-asian="bold" style:font-name-complex="Calibri2" style:font-family-complex="Calibri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528in" fo:margin-bottom="0.0693in" loext:contextual-spacing="false"/>
      <style:text-properties fo:color="#1f4e5f" style:font-name="Calibri1" fo:font-family="Calibri" style:font-family-generic="swiss" style:font-pitch="variable" fo:font-size="12pt" fo:font-weight="bold" style:font-name-asian="Calibri2" style:font-family-asian="Calibri" style:font-family-generic-asian="system" style:font-pitch-asian="variable" style:font-size-asian="12pt" style:font-weight-asian="bold" style:font-name-complex="Calibri2" style:font-family-complex="Calibri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default-outline-level="" style:class="text">
      <style:text-properties fo:color="#1f4d78" fo:font-size="12pt" style:font-size-asian="12pt" style:font-size-complex="12pt"/>
    </style:style>
    <style:style style:name="Heading_20_4" style:display-name="Heading 4" style:family="paragraph" style:parent-style-name="Heading" style:default-outline-level="" style:class="text">
      <style:text-properties fo:color="#2e74b5" fo:font-style="italic" style:font-style-asian="italic" style:font-style-complex="italic"/>
    </style:style>
    <style:style style:name="Heading_20_5" style:display-name="Heading 5" style:family="paragraph" style:parent-style-name="Heading" style:default-outline-level="" style:class="text">
      <style:text-properties fo:color="#2e74b5"/>
    </style:style>
    <style:style style:name="Heading_20_6" style:display-name="Heading 6" style:family="paragraph" style:parent-style-name="Heading" style:default-outline-level="" style:class="text">
      <style:text-properties fo:color="#1f4d78"/>
    </style:style>
    <style:style style:name="Strong" style:family="paragraph" style:default-outline-level="">
      <style:text-properties fo:font-weight="bold" style:font-weight-asian="bold" style:font-weight-complex="bold"/>
    </style:style>
    <style:style style:name="List_20_Paragraph" style:display-name="List Paragraph" style:family="paragraph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fo:color="#595959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4917in" fo:margin-bottom="0.4917in" fo:margin-left="0.8752in" fo:margin-right="0.875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83in" fo:margin-left="0in" fo:margin-right="0in" fo:margin-bottom="0.2189in" style:dynamic-spacing="true"/>
      </style:header-style>
      <style:footer-style>
        <style:header-footer-properties fo:min-height="0.2583in" fo:margin-left="0in" fo:margin-right="0in" fo:margin-top="0.2189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Project 2 — Project 3: Prescriptive Analytics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-named</meta:initial-creator>
    <meta:editing-cycles>2</meta:editing-cycles>
    <meta:creation-date>2026-07-12T18:54:00.130000000</meta:creation-date>
    <dc:date>2026-07-14T14:36:32.052000000</dc:date>
    <meta:editing-duration>PT55S</meta:editing-duration>
    <meta:document-statistic meta:table-count="2" meta:image-count="2" meta:object-count="0" meta:page-count="5" meta:paragraph-count="69" meta:word-count="1017" meta:character-count="6879" meta:non-whitespace-character-count="5917"/>
    <meta:generator>Neat_Office/6.2.8.2$Windows_x86 LibreOffice_project/</meta:generator>
  </office:meta>
</office:document-meta>
</file>