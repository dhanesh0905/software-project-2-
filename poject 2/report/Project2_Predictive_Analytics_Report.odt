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16000003CC804ABCF37F5BD410.png" manifest:media-type="image/png"/>
  <manifest:file-entry manifest:full-path="Pictures/1000020100000660000001DF512AA5F8A6DDC652.png" manifest:media-type="image/png"/>
  <manifest:file-entry manifest:full-path="Pictures/10000201000002F0000001DDFBED7F0C4ADE8FA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table:align="left" style:writing-mode="lr-tb"/>
    </style:style>
    <style:style style:name="Table1.A" style:family="table-column">
      <style:table-column-properties style:column-width="3.125in"/>
    </style:style>
    <style:style style:name="Table1.B" style:family="table-column">
      <style:table-column-properties style:column-width="3.12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1f4e5f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.A3" style:family="table-cell">
      <style:table-cell-properties style:vertical-align="middle" fo:background-color="#eaf2f4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25in" fo:margin-left="0in" fo:margin-top="0in" fo:margin-bottom="0in" table:align="left" style:writing-mode="lr-tb"/>
    </style:style>
    <style:style style:name="Table2.A" style:family="table-column">
      <style:table-column-properties style:column-width="1.041in"/>
    </style:style>
    <style:style style:name="Table2.B" style:family="table-column">
      <style:table-column-properties style:column-width="1.0417in"/>
    </style:style>
    <style:style style:name="Table2.D" style:family="table-column">
      <style:table-column-properties style:column-width="1.0403in"/>
    </style:style>
    <style:style style:name="Table2.F" style:family="table-column">
      <style:table-column-properties style:column-width="1.043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1f4e5f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2.A3" style:family="table-cell">
      <style:table-cell-properties style:vertical-align="middle" fo:background-color="#eaf2f4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master-page-name="Standard">
      <style:paragraph-properties fo:margin-top="1.25in" fo:margin-bottom="0in" loext:contextual-spacing="false" style:page-number="auto"/>
    </style:style>
    <style:style style:name="P4" style:family="paragraph" style:parent-style-name="Standard">
      <style:paragraph-properties fo:margin-top="0in" fo:margin-bottom="0.0835in" loext:contextual-spacing="false" fo:text-align="center" style:justify-single-word="false"/>
    </style:style>
    <style:style style:name="P5" style:family="paragraph" style:parent-style-name="Standard">
      <style:paragraph-properties fo:margin-top="0in" fo:margin-bottom="0.278in" loext:contextual-spacing="false" fo:text-align="center" style:justify-single-word="false"/>
    </style:style>
    <style:style style:name="P6" style:family="paragraph" style:parent-style-name="Standard">
      <style:paragraph-properties fo:margin-top="0in" fo:margin-bottom="0.2083in" loext:contextual-spacing="false" fo:text-align="center" style:justify-single-word="false"/>
    </style:style>
    <style:style style:name="P7" style:family="paragraph" style:parent-style-name="Standard">
      <style:paragraph-properties fo:margin-top="0in" fo:margin-bottom="0.8335in" loext:contextual-spacing="false" fo:text-align="center" style:justify-single-word="false"/>
    </style:style>
    <style:style style:name="P8" style:family="paragraph" style:parent-style-name="Standard">
      <style:paragraph-properties fo:margin-top="0in" fo:margin-bottom="0.0555in" loext:contextual-spacing="false" fo:text-align="center" style:justify-single-word="false"/>
    </style:style>
    <style:style style:name="P9" style:family="paragraph" style:parent-style-name="Standard">
      <style:paragraph-properties fo:margin-top="0in" fo:margin-bottom="0.111in" loext:contextual-spacing="false" fo:text-align="start" style:justify-single-word="false"/>
    </style:style>
    <style:style style:name="P10" style:family="paragraph" style:parent-style-name="Standard">
      <style:paragraph-properties fo:margin-top="0.0835in" fo:margin-bottom="0.0417in" loext:contextual-spacing="false" fo:text-align="center" style:justify-single-word="false"/>
    </style:style>
    <style:style style:name="P11" style:family="paragraph" style:parent-style-name="Standard">
      <style:paragraph-properties fo:margin-top="0in" fo:margin-bottom="0.1528in" loext:contextual-spacing="false" fo:text-align="center" style:justify-single-word="false"/>
    </style:style>
    <style:style style:name="P12" style:family="paragraph" style:parent-style-name="Heading_20_1">
      <style:paragraph-properties fo:margin-top="0.25in" fo:margin-bottom="0.111in" loext:contextual-spacing="false" fo:break-before="page"/>
    </style:style>
    <style:style style:name="P13" style:family="paragraph" style:parent-style-name="Heading_20_1">
      <style:paragraph-properties fo:margin-top="0.25in" fo:margin-bottom="0.111in" loext:contextual-spacing="false"/>
    </style:style>
    <style:style style:name="P14" style:family="paragraph" style:parent-style-name="Heading_20_2">
      <style:paragraph-properties fo:margin-top="0.1807in" fo:margin-bottom="0.0835in" loext:contextual-spacing="false"/>
    </style:style>
    <style:style style:name="P15" style:family="paragraph" style:parent-style-name="List_20_Paragraph" style:list-style-name="WWNum1">
      <style:paragraph-properties fo:margin-top="0in" fo:margin-bottom="0.0555in" loext:contextual-spacing="false"/>
    </style:style>
    <style:style style:name="T1" style:family="text">
      <style:text-properties fo:color="#595959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595959" fo:font-size="12pt" fo:font-style="italic" style:font-size-asian="12pt" style:font-style-asian="italic" style:font-size-complex="12pt" style:font-style-complex="italic"/>
    </style:style>
    <style:style style:name="T3" style:family="text">
      <style:text-properties fo:color="#595959" fo:font-size="9pt" fo:font-style="italic" style:font-size-asian="9pt" style:font-style-asian="italic" style:font-size-complex="9pt" style:font-style-complex="italic"/>
    </style:style>
    <style:style style:name="T4" style:family="text">
      <style:text-properties fo:color="#595959" fo:font-size="8pt" style:font-size-asian="8pt" style:font-size-complex="8pt"/>
    </style:style>
    <style:style style:name="T5" style:family="text">
      <style:text-properties fo:color="#1f4e5f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02fdfd" style:font-size-asian="11pt" style:font-size-complex="11pt"/>
    </style:style>
    <style:style style:name="T9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<text:span text:style-name="T1">SOFTWARE PROJECT 2</text:span></text:p>
      <text:p text:style-name="P5"><text:span text:style-name="T5">Project 2 — Predictive Analytics</text:span></text:p>
      <text:p text:style-name="P6"><text:span text:style-name="T6">Predicting Titanic Passenger Survival</text:span></text:p>
      <text:p text:style-name="P7"><text:span text:style-name="T2">Dataset: titanic.csv (891 records)</text:span></text:p>
      <text:p text:style-name="P8"><text:span text:style-name="T7">Prepared by: </text:span><text:span text:style-name="T8">dhanesh kumar</text:span></text:p>
      <text:p text:style-name="P8"><text:span text:style-name="T7">Course: </text:span><text:span text:style-name="T8">software project 2 / predictive </text:span></text:p>
      <text:p text:style-name="P8"><text:span text:style-name="T7">Date: July 1</text:span><text:span text:style-name="T8">1</text:span><text:span text:style-name="T7">, 2026</text:span></text:p>
      <text:p text:style-name="Standard"/>
      <text:p text:style-name="P12">1. Introduction &amp; Business Objective</text:p>
      <text:p text:style-name="P9">Predictive analytics answers "what is likely to happen?" by learning a pattern from historical, labeled data — cases where the outcome is already known — and using that pattern to predict outcomes for new cases. This project uses the classic Titanic passenger dataset as a stand-in for that workflow: given a passenger's characteristics, can we predict whether they survived? The exact same supervised-classification pipeline used here — clean data, engineer features, train a classifier, evaluate with precision/recall/ROC-AUC — is the standard template for real business predictive analytics: customer churn, loan default, or insurance-claim prediction. Only the label and features change.</text:p>
      <text:p text:style-name="P13">2. Dataset Description</text:p>
      <text:p text:style-name="P9">The analysis uses the Titanic passenger dataset (891 records before cleaning), a different dataset from Project 1, containing demographic and travel details plus the known survival outcom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"><text:span text:style-name="T9">Column</text:span></text:p>
            </table:table-cell>
            <table:table-cell table:style-name="Table1.A1" office:value-type="string">
              <text:p text:style-name="P1"><text:span text:style-name="T9">Description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<text:span text:style-name="T10">survived</text:span></text:p>
          </table:table-cell>
          <table:table-cell table:style-name="Table1.A2" office:value-type="string">
            <text:p text:style-name="P1"><text:span text:style-name="T10">Target: 1 = survived, 0 = did not survive</text:span></text:p>
          </table:table-cell>
        </table:table-row>
        <table:table-row table:style-name="Table1.1">
          <table:table-cell table:style-name="Table1.A3" office:value-type="string">
            <text:p text:style-name="P1"><text:span text:style-name="T10">pclass</text:span></text:p>
          </table:table-cell>
          <table:table-cell table:style-name="Table1.A3" office:value-type="string">
            <text:p text:style-name="P1"><text:span text:style-name="T10">Ticket/passenger class (1st, 2nd, 3rd)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10">sex, age</text:span></text:p>
          </table:table-cell>
          <table:table-cell table:style-name="Table1.A2" office:value-type="string">
            <text:p text:style-name="P1"><text:span text:style-name="T10">Passenger demographics</text:span></text:p>
          </table:table-cell>
        </table:table-row>
        <table:table-row table:style-name="Table1.1">
          <table:table-cell table:style-name="Table1.A3" office:value-type="string">
            <text:p text:style-name="P1"><text:span text:style-name="T10">sibsp, parch</text:span></text:p>
          </table:table-cell>
          <table:table-cell table:style-name="Table1.A3" office:value-type="string">
            <text:p text:style-name="P1"><text:span text:style-name="T10">Number of siblings/spouses and parents/children aboard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10">fare</text:span></text:p>
          </table:table-cell>
          <table:table-cell table:style-name="Table1.A2" office:value-type="string">
            <text:p text:style-name="P1"><text:span text:style-name="T10">Ticket fare paid</text:span></text:p>
          </table:table-cell>
        </table:table-row>
        <table:table-row table:style-name="Table1.1">
          <table:table-cell table:style-name="Table1.A3" office:value-type="string">
            <text:p text:style-name="P1"><text:span text:style-name="T10">embarked</text:span></text:p>
          </table:table-cell>
          <table:table-cell table:style-name="Table1.A3" office:value-type="string">
            <text:p text:style-name="P1"><text:span text:style-name="T10">Port of embarkation (C, Q, S)</text:span></text:p>
          </table:table-cell>
        </table:table-row>
      </table:table>
      <text:p text:style-name="P13">3. Methodology</text:p>
      <text:p text:style-name="P14">3.1 Importing Libraries and Loading the Data</text:p>
      <text:p text:style-name="P9">In addition to pandas/numpy/matplotlib/seaborn, scikit-learn supplies the train/test split, the Logistic Regression and Random Forest classifiers, feature scaling, and the evaluation metrics (accuracy, precision, recall, F1, ROC-AUC, confusion matrix).</text:p>
      <text:p text:style-name="P14">3.2 Data Cleaning and Preprocessing</text:p>
      <text:p text:style-name="P9">Age is missing for about 20% of passengers and embarked for 2. Age is imputed using the median within each passenger-class-and-sex group — a first-class woman and a third-class man have very different typical ages, so a single overall median would be a worse estimate than a group-aware one. The 2 missing embarked values are filled with the most common port.</text:p>
      <text:p text:style-name="P14">3.3 Duplicate Removal</text:p>
      <text:p text:style-name="P9">113 of 891 rows (12.7%) are exact duplicates. An important caveat is stated explicitly in the report rather than glossed over: this simplified version of the dataset has no passenger ID, name, or ticket number, so some “duplicates” may be genuinely different passengers who share the same class/sex/age/fare/embarkation combination rather than true data-entry errors. The mandatory de-duplication step is still applied — with no identifier to disambiguate them, exact-duplicate rows carry no additional information for the model either way.</text:p>
      <text:p text:style-name="P14"><text:soft-page-break/>3.4 Feature Selection</text:p>
      <text:p text:style-name="P9">Several columns are dropped as redundant or leaky: alive is simply survived re-spelled as text (keeping it would let the model see the answer directly); class, who, adult_male, and embark_town duplicate information already captured by pclass, sex+age, and embarked; deck is 77% missing; and alone is a deterministic function of sibsp and parch, already in the model.</text:p>
      <text:p text:style-name="P14">3.5 Encoding Categorical Attributes</text:p>
      <text:p text:style-name="P9">sex is mapped to a binary 0/1. embarked has no natural order (it is a port name, not a ranked category), so it is one-hot encoded rather than given an arbitrary ordinal encoding.</text:p>
      <text:p text:style-name="P13">4. Exploratory Data Analysis</text:p>
      <text:p text:style-name="P9">Survival was strongly stratified by sex (74% for women vs. 22% for men) and by passenger class (64% in 1st class vs. 26% in 3rd) — consistent with the historical “women and children first” evacuation norm and first-class passengers' proximity to lifeboats. This suggested sex and pclass would be the model's strongest predictors, which is verified in Section 5.</text:p>
      <text:p text:style-name="P10"><draw:frame draw:style-name="fr1" draw:name="Image1" text:anchor-type="as-char" svg:width="5.4165in" svg:height="4.0417in" draw:z-index="0"><draw:image xlink:href="Pictures/1000020100000516000003CC804ABCF37F5BD410.png" xlink:type="simple" xlink:show="embed" xlink:actuate="onLoad" loext:mime-type="image/png"/></draw:frame></text:p>
      <text:p text:style-name="P11"><text:span text:style-name="T3">Figure 1. Survival rate by class/sex, age distribution by outcome, fare by outcome, and the correlation heatmap.</text:span></text:p>
      <text:p text:style-name="P13">5. Model Building &amp; Evaluation</text:p>
      <text:p text:style-name="P9">The cleaned data is split 80/20 into training and test sets (stratified on the target to preserve the survival rate in both splits). Two classifiers are trained and compared on the held-out test set: Logistic Regression, a simple and highly interpretable baseline, and Random Forest, a more flexible ensemble model capable of capturing interactions such as “being a child and in third class.”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B"/>
        <table:table-column table:style-name="Table2.F"/>
        <table:table-header-rows>
          <table:table-row table:style-name="Table2.1">
            <table:table-cell table:style-name="Table2.A1" office:value-type="string">
              <text:p text:style-name="P1"><text:span text:style-name="T9">Model</text:span></text:p>
            </table:table-cell>
            <table:table-cell table:style-name="Table2.A1" office:value-type="string">
              <text:p text:style-name="P1"><text:span text:style-name="T9">Accuracy</text:span></text:p>
            </table:table-cell>
            <table:table-cell table:style-name="Table2.A1" office:value-type="string">
              <text:p text:style-name="P1"><text:span text:style-name="T9">Precision</text:span></text:p>
            </table:table-cell>
            <table:table-cell table:style-name="Table2.A1" office:value-type="string">
              <text:p text:style-name="P1"><text:span text:style-name="T9">Recall</text:span></text:p>
            </table:table-cell>
            <table:table-cell table:style-name="Table2.A1" office:value-type="string">
              <text:p text:style-name="P1"><text:span text:style-name="T9">F1</text:span></text:p>
            </table:table-cell>
            <table:table-cell table:style-name="Table2.A1" office:value-type="string">
              <text:p text:style-name="P1"><text:span text:style-name="T9">ROC-AUC</text:span>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"><text:span text:style-name="T10">Logistic </text:span><text:soft-page-break/><text:span text:style-name="T10">Regression</text:span></text:p>
          </table:table-cell>
          <table:table-cell table:style-name="Table2.A2" office:value-type="string">
            <text:p text:style-name="P1"><text:span text:style-name="T10">0.808</text:span></text:p>
          </table:table-cell>
          <table:table-cell table:style-name="Table2.A2" office:value-type="string">
            <text:p text:style-name="P1"><text:span text:style-name="T10">0.746</text:span></text:p>
          </table:table-cell>
          <table:table-cell table:style-name="Table2.A2" office:value-type="string">
            <text:p text:style-name="P1"><text:span text:style-name="T10">0.815</text:span></text:p>
          </table:table-cell>
          <table:table-cell table:style-name="Table2.A2" office:value-type="string">
            <text:p text:style-name="P1"><text:span text:style-name="T10">0.779</text:span></text:p>
          </table:table-cell>
          <table:table-cell table:style-name="Table2.A2" office:value-type="string">
            <text:p text:style-name="P1"><text:span text:style-name="T10">0.874</text:span></text:p>
          </table:table-cell>
        </table:table-row>
        <table:table-row table:style-name="Table2.1">
          <table:table-cell table:style-name="Table2.A3" office:value-type="string">
            <text:p text:style-name="P1"><text:span text:style-name="T10">Random Forest</text:span></text:p>
          </table:table-cell>
          <table:table-cell table:style-name="Table2.A3" office:value-type="string">
            <text:p text:style-name="P1"><text:span text:style-name="T10">0.827</text:span></text:p>
          </table:table-cell>
          <table:table-cell table:style-name="Table2.A3" office:value-type="string">
            <text:p text:style-name="P1"><text:span text:style-name="T10">0.852</text:span></text:p>
          </table:table-cell>
          <table:table-cell table:style-name="Table2.A3" office:value-type="string">
            <text:p text:style-name="P1"><text:span text:style-name="T10">0.708</text:span></text:p>
          </table:table-cell>
          <table:table-cell table:style-name="Table2.A3" office:value-type="string">
            <text:p text:style-name="P1"><text:span text:style-name="T10">0.773</text:span></text:p>
          </table:table-cell>
          <table:table-cell table:style-name="Table2.A3" office:value-type="string">
            <text:p text:style-name="P1"><text:span text:style-name="T10">0.872</text:span></text:p>
          </table:table-cell>
        </table:table-row>
      </table:table>
      <text:p text:style-name="P10"><draw:frame draw:style-name="fr1" draw:name="Image2" text:anchor-type="as-char" svg:width="5.6252in" svg:height="1.6457in" draw:z-index="1"><draw:image xlink:href="Pictures/1000020100000660000001DF512AA5F8A6DDC652.png" xlink:type="simple" xlink:show="embed" xlink:actuate="onLoad" loext:mime-type="image/png"/></draw:frame></text:p>
      <text:p text:style-name="P11"><text:span text:style-name="T3">Figure 2. Confusion matrices for both models and their ROC curves.</text:span></text:p>
      <text:p text:style-name="P10"><draw:frame draw:style-name="fr1" draw:name="Image3" text:anchor-type="as-char" svg:width="4.3752in" svg:height="2.7709in" draw:z-index="2"><draw:image xlink:href="Pictures/10000201000002F0000001DDFBED7F0C4ADE8FA2.png" xlink:type="simple" xlink:show="embed" xlink:actuate="onLoad" loext:mime-type="image/png"/></draw:frame></text:p>
      <text:p text:style-name="P11"><text:span text:style-name="T3">Figure 3. Random Forest feature importance ranking.</text:span></text:p>
      <text:p text:style-name="P13">6. Results Interpretation &amp; Discussion</text:p>
      <text:list xml:id="list2462079666" text:style-name="WWNum1">
        <text:list-item>
          <text:p text:style-name="P15">Both models score well above the 50% random baseline; Logistic Regression edges out a slightly higher ROC-AUC, while Random Forest achieves higher precision, illustrating a genuine accuracy/precision-recall trade-off rather than one model being simply “better.”</text:p>
        </text:list-item>
        <text:list-item>
          <text:p text:style-name="P15">Feature importance confirms the EDA: sex is by far the strongest predictor, followed by fare/pclass (proxies for socioeconomic status and cabin location), then age.</text:p>
        </text:list-item>
        <text:list-item>
          <text:p text:style-name="P15">In a real safety-planning context, recall on at-risk cases often matters more than raw accuracy — missing an at-risk case is usually costlier than a false alarm. The confusion matrices let a stakeholder see that trade-off directly rather than relying on one number.</text:p>
        </text:list-item>
      </text:list>
      <text:p text:style-name="P9">Where this generalizes: replace “passenger” with “customer” and “survived” with “churned,” “defaulted,” or “converted,” and this exact pipeline — clean, encode, split, train, evaluate, inspect feature importance — is the standard template for real business predictive analytics.</text:p>
      <text:p text:style-name="P13">7. Conclusion</text:p>
      <text:p text:style-name="P9">This project demonstrates a complete predictive-analytics workflow on a labeled classification problem: careful handling of missing data and potential target leakage, encoding, model comparison, and a multi-<text:soft-page-break/>metric evaluation that goes beyond a single accuracy figure. The resulting model and its feature-importance ranking are directly interpretable and transferable to analogous binary-outcome business proble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default-outline-level="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" style:class="text">
      <style:paragraph-properties fo:margin-top="0.2083in" fo:margin-bottom="0.1043in" loext:contextual-spacing="false"/>
      <style:text-properties fo:color="#1f4e5f" style:font-name="Calibri1" fo:font-family="Calibri" style:font-family-generic="swiss" style:font-pitch="variable" fo:font-size="15pt" fo:font-weight="bold" style:font-name-asian="Calibri2" style:font-family-asian="Calibri" style:font-family-generic-asian="system" style:font-pitch-asian="variable" style:font-size-asian="15pt" style:font-weight-asian="bold" style:font-name-complex="Calibri2" style:font-family-complex="Calibri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528in" fo:margin-bottom="0.0693in" loext:contextual-spacing="false"/>
      <style:text-properties fo:color="#1f4e5f" style:font-name="Calibri1" fo:font-family="Calibri" style:font-family-generic="swiss" style:font-pitch="variable" fo:font-size="12pt" fo:font-weight="bold" style:font-name-asian="Calibri2" style:font-family-asian="Calibri" style:font-family-generic-asian="system" style:font-pitch-asian="variable" style:font-size-asian="12pt" style:font-weight-asian="bold" style:font-name-complex="Calibri2" style:font-family-complex="Calibri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default-outline-level="" style:class="text">
      <style:text-properties fo:color="#1f4d78" fo:font-size="12pt" style:font-size-asian="12pt" style:font-size-complex="12pt"/>
    </style:style>
    <style:style style:name="Heading_20_4" style:display-name="Heading 4" style:family="paragraph" style:parent-style-name="Heading" style:default-outline-level="" style:class="text">
      <style:text-properties fo:color="#2e74b5" fo:font-style="italic" style:font-style-asian="italic" style:font-style-complex="italic"/>
    </style:style>
    <style:style style:name="Heading_20_5" style:display-name="Heading 5" style:family="paragraph" style:parent-style-name="Heading" style:default-outline-level="" style:class="text">
      <style:text-properties fo:color="#2e74b5"/>
    </style:style>
    <style:style style:name="Heading_20_6" style:display-name="Heading 6" style:family="paragraph" style:parent-style-name="Heading" style:default-outline-level="" style:class="text">
      <style:text-properties fo:color="#1f4d78"/>
    </style:style>
    <style:style style:name="Strong" style:family="paragraph" style:default-outline-level="">
      <style:text-properties fo:font-weight="bold" style:font-weight-asian="bold" style:font-weight-complex="bold"/>
    </style:style>
    <style:style style:name="List_20_Paragraph" style:display-name="List Paragraph" style:family="paragraph" style:default-outline-level=""/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center" style:justify-single-word="false"/>
    </style:style>
    <style:style style:name="MT1" style:family="text">
      <style:text-properties fo:color="#595959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4917in" fo:margin-bottom="0.4917in" fo:margin-left="0.8752in" fo:margin-right="0.875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83in" fo:margin-left="0in" fo:margin-right="0in" fo:margin-bottom="0.2189in" style:dynamic-spacing="true"/>
      </style:header-style>
      <style:footer-style>
        <style:header-footer-properties fo:min-height="0.2583in" fo:margin-left="0in" fo:margin-right="0in" fo:margin-top="0.2189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Project 2 — Project 2: Predictive Analytics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-named</meta:initial-creator>
    <meta:editing-cycles>2</meta:editing-cycles>
    <meta:creation-date>2026-07-12T18:53:19.845000000</meta:creation-date>
    <dc:date>2026-07-14T14:31:06.850000000</dc:date>
    <meta:editing-duration>PT2M20S</meta:editing-duration>
    <meta:document-statistic meta:table-count="2" meta:image-count="3" meta:object-count="0" meta:page-count="5" meta:paragraph-count="73" meta:word-count="873" meta:character-count="5919" meta:non-whitespace-character-count="5106"/>
    <meta:generator>Neat_Office/6.2.8.2$Windows_x86 LibreOffice_project/</meta:generator>
  </office:meta>
</office:document-meta>
</file>